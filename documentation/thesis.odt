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Ubuntu Sans" svg:font-family="Ubuntu Sans" style:font-family-generic="swiss" style:font-pitch="variable"/>
    <style:font-face style:name="Ubuntu Sans Mono" svg:font-family="Ubuntu Sans Mono" style:font-family-generic="swiss"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oogle Sans Text" svg:font-family="Google Sans Text" style:font-family-generic="system"/>
    <style:font-face style:name="JetBrains Mono" svg:font-family="JetBrains Mono" style:font-family-generic="roman"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Textbody"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Textbody" style:family="paragraph"/>
    <style:style style:name="T8" style:parent-style-name="DefaultParagraphFont" style:family="text">
      <style:text-properties fo:font-weight="bold" style:font-weight-asian="bold" style:font-weight-complex="bold"/>
    </style:style>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text-properties fo:font-weight="bold" style:font-weight-asian="bold" style:font-weight-complex="bold"/>
    </style:style>
    <style:style style:name="T1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5" style:parent-style-name="DefaultParagraphFont" style:family="text">
      <style:text-properties style:font-name="Google Sans Text" fo:font-size="9pt" style:font-size-asian="9pt"/>
    </style:style>
    <style:style style:name="T16" style:parent-style-name="DefaultParagraphFont" style:family="text">
      <style:text-properties style:font-name="Google Sans Text" fo:color="#000000" fo:font-size="9pt" style:font-size-asian="9pt"/>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font-name="JetBrains Mono" fo:font-style="italic" style:font-style-asian="italic" fo:color="#111111" fo:font-size="10pt" style:font-size-asian="10pt"/>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25"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fo:font-style="italic" style:font-style-asian="italic"/>
    </style:style>
    <style:style style:name="T28" style:parent-style-name="HTMLCode" style:family="text">
      <style:text-properties style:font-name-asian="Noto Serif CJK SC"/>
    </style:style>
    <style:style style:name="T29" style:parent-style-name="Hyperlink" style:family="text">
      <style:text-properties fo:font-weight="bold" style:font-weight-asian="bold" style:font-weight-complex="bold"/>
    </style:style>
    <style:style style:name="T30" style:parent-style-name="Hyperlink" style:family="text">
      <style:text-properties fo:font-weight="bold" style:font-weight-asian="bold" style:font-weight-complex="bold"/>
    </style:style>
    <style:style style:name="T31" style:parent-style-name="Hyperlink" style:family="text">
      <style:text-properties fo:font-weight="bold" style:font-weight-asian="bold" style:font-weight-complex="bold"/>
    </style:style>
    <style:style style:name="T32" style:parent-style-name="Hyperlink" style:family="text">
      <style:text-properties fo:font-weight="bold" style:font-weight-asian="bold" style:font-weight-complex="bold"/>
    </style:style>
    <style:style style:name="T33" style:parent-style-name="DefaultParagraphFont" style:family="text">
      <style:text-properties style:font-name="Liberation Mono"/>
    </style:style>
    <style:style style:name="T34" style:parent-style-name="DefaultParagraphFont" style:family="text">
      <style:text-properties style:font-name="Liberation Mono"/>
    </style:style>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37"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P38" style:parent-style-name="Textbody" style:family="paragraph">
      <style:text-properties fo:color="#666666"/>
    </style:style>
    <style:style style:name="P39" style:parent-style-name="Textbody" style:family="paragraph">
      <style:text-properties fo:color="#666666"/>
    </style:style>
    <style:style style:name="T40" style:parent-style-name="HTMLCode" style:family="text">
      <style:text-properties style:font-name-asian="Noto Serif CJK SC"/>
    </style:style>
    <style:style style:name="T41" style:parent-style-name="Hyperlink" style:family="text">
      <style:text-properties fo:font-weight="bold" style:font-weight-asian="bold" style:font-weight-complex="bold"/>
    </style:style>
    <style:style style:name="T42" style:parent-style-name="DefaultParagraphFont" style:family="text">
      <style:text-properties style:font-name="Arial" style:font-name-complex="Arial" fo:color="#1D4ED8" fo:font-size="9pt" style:font-size-asian="9pt" style:font-size-complex="9pt" fo:background-color="#EFF6FF"/>
    </style:style>
    <style:style style:name="P43" style:parent-style-name="Textbody" style:family="paragraph"/>
    <style:style style:name="P44" style:parent-style-name="Textbody" style:family="paragraph"/>
    <style:style style:name="P45" style:parent-style-name="Textbody" style:family="paragraph">
      <style:paragraph-properties fo:margin-left="0.25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style:font-name="Liberation Mono" fo:font-weight="bold" style:font-weight-asian="bold" style:font-weight-complex="bold"/>
    </style:style>
    <style:style style:name="P48" style:parent-style-name="Heading1" style:family="paragraph">
      <style:text-properties style:font-name="Liberation Serif" style:font-name-asian="Noto Serif CJK SC" style:font-name-complex="Noto Sans Devanagari" fo:font-weight="normal" style:font-weight-asian="normal" style:font-weight-complex="normal" fo:font-size="12pt" style:font-size-asian="12pt" style:font-size-complex="12pt"/>
    </style:style>
    <style:style style:name="T49" style:parent-style-name="DefaultParagraphFont" style:family="text">
      <style:text-properties fo:font-style="italic" style:font-style-asian="italic" style:text-underline-type="single" style:text-underline-style="solid" style:text-underline-width="auto" style:text-underline-mode="continuous"/>
    </style:style>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T54" style:parent-style-name="HTMLCode" style:family="text">
      <style:text-properties style:font-name-asian="Ubuntu Sans Mono"/>
    </style:style>
    <style:style style:name="P55" style:parent-style-name="NormalWeb" style:family="paragraph"/>
    <style:style style:name="T56" style:parent-style-name="DefaultParagraphFont" style:family="text">
      <style:text-properties fo:font-weight="bold" style:font-weight-asian="bold" style:font-weight-complex="bold"/>
    </style:style>
    <style:style style:name="P57" style:parent-style-name="NormalWeb" style:family="paragraph"/>
    <style:style style:name="P58" style:parent-style-name="NormalWeb" style:family="paragraph"/>
    <style:style style:name="T59" style:parent-style-name="DefaultParagraphFont" style:family="text">
      <style:text-properties fo:font-weight="bold" style:font-weight-asian="bold" style:font-weight-complex="bold"/>
    </style:style>
    <style:style style:name="P60" style:parent-style-name="NormalWeb" style:family="paragraph"/>
    <style:style style:name="T61" style:parent-style-name="DefaultParagraphFont" style:family="text">
      <style:text-properties fo:font-weight="bold" style:font-weight-asian="bold" style:font-weight-complex="bold"/>
    </style:style>
    <style:style style:name="P62" style:parent-style-name="NormalWeb" style:family="paragraph"/>
    <style:style style:name="P63" style:parent-style-name="NormalWeb" style:family="paragraph"/>
    <style:style style:name="T64" style:parent-style-name="DefaultParagraphFont" style:family="text">
      <style:text-properties fo:font-weight="bold" style:font-weight-asian="bold" style:font-weight-complex="bold"/>
    </style:style>
    <style:style style:name="P65" style:parent-style-name="NormalWeb" style:family="paragraph"/>
    <style:style style:name="T66" style:parent-style-name="DefaultParagraphFont" style:family="text">
      <style:text-properties fo:font-weight="bold" style:font-weight-asian="bold" style:font-weight-complex="bold"/>
    </style:style>
    <style:style style:name="P67" style:parent-style-name="NormalWeb" style:family="paragraph"/>
    <style:style style:name="T68" style:parent-style-name="DefaultParagraphFont" style:family="text">
      <style:text-properties fo:font-weight="bold" style:font-weight-asian="bold" style:font-weight-complex="bold"/>
    </style:style>
    <style:style style:name="P69" style:parent-style-name="NormalWeb" style:family="paragraph"/>
    <style:style style:name="P70" style:parent-style-name="NormalWeb" style:family="paragraph"/>
    <style:style style:name="T71" style:parent-style-name="DefaultParagraphFont" style:family="text">
      <style:text-properties fo:font-weight="bold" style:font-weight-asian="bold" style:font-weight-complex="bold"/>
    </style:style>
    <style:style style:name="P72" style:parent-style-name="NormalWeb" style:family="paragraph"/>
    <style:style style:name="T73" style:parent-style-name="DefaultParagraphFont" style:family="text">
      <style:text-properties fo:font-weight="bold" style:font-weight-asian="bold" style:font-weight-complex="bold"/>
    </style:style>
    <style:style style:name="P74" style:parent-style-name="NormalWeb" style:family="paragraph"/>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NormalWeb" style:family="paragraph"/>
    <style:style style:name="T79" style:parent-style-name="DefaultParagraphFont" style:family="text">
      <style:text-properties fo:font-weight="bold" style:font-weight-asian="bold" style:font-weight-complex="bold"/>
    </style:style>
    <style:style style:name="P80" style:parent-style-name="NormalWeb" style:family="paragraph"/>
    <style:style style:name="P81" style:parent-style-name="NormalWeb" style:family="paragraph"/>
    <style:style style:name="T82" style:parent-style-name="DefaultParagraphFont" style:family="text">
      <style:text-properties fo:font-weight="bold" style:font-weight-asian="bold" style:font-weight-complex="bold"/>
    </style:style>
    <style:style style:name="P83" style:parent-style-name="NormalWeb" style:family="paragraph"/>
    <style:style style:name="T84" style:parent-style-name="DefaultParagraphFont" style:family="text">
      <style:text-properties fo:font-weight="bold" style:font-weight-asian="bold" style:font-weight-complex="bold"/>
    </style:style>
    <style:style style:name="P85" style:parent-style-name="NormalWeb" style:family="paragraph"/>
    <style:style style:name="P86" style:parent-style-name="NormalWeb" style:family="paragraph"/>
    <style:style style:name="T87" style:parent-style-name="DefaultParagraphFont" style:family="text">
      <style:text-properties fo:font-weight="bold" style:font-weight-asian="bold" style:font-weight-complex="bold"/>
    </style:style>
    <style:style style:name="P88" style:parent-style-name="NormalWeb" style:family="paragraph"/>
    <style:style style:name="T89" style:parent-style-name="DefaultParagraphFont" style:family="text">
      <style:text-properties fo:font-weight="bold" style:font-weight-asian="bold" style:font-weight-complex="bold"/>
    </style:style>
    <style:style style:name="P90" style:parent-style-name="NormalWeb" style:family="paragraph"/>
    <style:style style:name="P91" style:parent-style-name="NormalWeb" style:family="paragraph"/>
    <style:style style:name="T92"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45674in, 0in, 0.31547in)"/>
    </style:style>
  </office:automatic-styles>
  <office:body>
    <office:text text:use-soft-page-breaks="true">
      <text:h text:style-name="P1" text:outline-level="1">Business rules</text:h>
      <text:h text:style-name="Heading2" text:outline-level="2">Order status and Payment status</text:h>
      <text:p text:style-name="Textbody">In order entity there are two columns<text:s/><text:span text:style-name="T2">order_status</text:span><text:s/>and<text:s/><text:span text:style-name="T3">payment_status</text:span><text:s/>both with constraint character check. Also in service layer (spring<text:s/>boot) the OrderStatus and PaymentStatus are represented as enums.</text:p>
      <text:p text:style-name="Textbody">The naming is not the best since orderStatus is broader and paymentStatus is specific but thing of order status as the status of delivery and the payment as the name suggest the status of the payment.</text:p>
      <text:p text:style-name="Textbody">OrderStatus and PaymentStatus although having different instances (delivered mean finished order but completed mean finished payment), they are linked togather. Roles</text:p>
      <text:list text:style-name="LFO1" text:continue-numbering="true">
        <text:list-item>
          <text:p text:style-name="P4"><text:line-break/>If the payment status is<text:s/><text:span text:style-name="T5">failed<text:s/></text:span>the order status must also be<text:s/><text:span text:style-name="T6">failed.</text:span></text:p>
        </text:list-item>
        <text:list-item>
          <text:p text:style-name="P7">If the<text:s/>status changes to failed there must be a<text:s/><text:span text:style-name="T8">reasonOfFailure<text:s/></text:span>represented as column in Orders.</text:p>
        </text:list-item>
        <text:list-item>
          <text:p text:style-name="P9">An order<text:s/><text:span text:style-name="StrongEmphasis">cannot be marked as<text:s/></text:span><text:span text:style-name="SourceText">DELIVERED</text:span><text:span text:style-name="StrongEmphasis"><text:s/>unless the payment has been successfully completed</text:span>.</text:p>
        </text:list-item>
      </text:list>
      <text:p text:style-name="Textbody">For example, when the delivery person meets the receiver, the product<text:s/><text:span text:style-name="StrongEmphasis">must</text:span><text:span text:style-name="StrongEmphasis"><text:s/>not be delivered before the payment transaction is finalized</text:span>.</text:p>
      <text:list text:style-name="LFO2" text:continue-numbering="true">
        <text:list-item>
          <text:p text:style-name="P10">If the payment method is<text:s/><text:span text:style-name="SourceText">CASH_ON_DELIVERY</text:span>, the delivery person must<text:s/><text:span text:style-name="StrongEmphasis">first receive the cash</text:span><text:s/>and then<text:s/><text:span text:style-name="StrongEmphasis">update the payment status to<text:s/></text:span><text:span text:style-name="SourceText">COMPLETED</text:span><text:s/>before marking the order as<text:s/><text:span text:style-name="SourceText">DELIVERED</text:span>.</text:p>
        </text:list-item>
        <text:list-item>
          <text:p text:style-name="P11">If the payment<text:s/>method is<text:s/><text:span text:style-name="SourceText">POK</text:span><text:span text:style-name="StrongEmphasis"><text:s/>(card payment)</text:span>, the delivery person<text:s/><text:span text:style-name="StrongEmphasis">cannot deliver the order if the p</text:span><text:span text:style-name="StrongEmphasis"><text:tab/>ayment is not already completed</text:span>, because they<text:s/><text:span text:style-name="StrongEmphasis">cannot collect the money</text:span><text:s/>and<text:s/><text:span text:style-name="StrongEmphasis">do not have the authority to change the payment status</text:span>.</text:p>
        </text:list-item>
      </text:list>
      <text:p text:style-name="Textbody">This rule ensures that<text:s/><text:span text:style-name="StrongEmphasis">order delivery is<text:s/></text:span><text:span text:style-name="StrongEmphasis">strictly dependent on successful payment</text:span>, preventing unpaid deliveries and enforcing correct responsibility boundaries in the system.</text:p>
      <text:p text:style-name="Textbody"/>
      <text:h text:style-name="Heading1" text:outline-level="1">User-Roles</text:h>
      <text:h text:style-name="Heading2" text:outline-level="2">MANAGER</text:h>
      <text:p text:style-name="Textbody">The delivery user has a sidebar with nav links that show pages such as</text:p>
      <text:p text:style-name="Textbody">First let go with WEBSOCKET pages</text:p>
      <text:p text:style-name="P12">ALL ORDERS FETCHED FROM BACKEND ARE are related to the branch manager.</text:p>
      <text:p text:style-name="Textbody"><text:span text:style-name="T13">Incoming- orders</text:span><text:s/>: Orders with status initialized</text:p>
      <text:soft-page-break/>
      <text:p text:style-name="Textbody">GET →<text:a xlink:href="http://localhost:8080/api/orders/all?orderStatus=INITIALIZED&amp;page=0&amp;size=20" office:target-frame-name="_top" xlink:show="replace">http://localhost:8080/api/orders/all?orderStatus=INITIALIZED&amp;page=0&amp;size=20</text:a></text:p>
      <text:p text:style-name="Textbody"/>
      <text:p text:style-name="Textbody"><text:span text:style-name="T14">Preparation Queue :<text:s/></text:span>Both statuses confirmed and preparing</text:p>
      <text:p text:style-name="Textbody">GET →<text:a xlink:href="http://localhost:8080/api/orders/allorderStatus=CONFIRMED&amp;orderStatus=PREPARING&amp;page=0&amp;size=20" office:target-frame-name="_top" xlink:show="replace"><text:span text:style-name="T15">http://localhost:8080/api/orders/allorderStatus=CONFIRMED&amp;orderStatus=PREPARING&amp;page=0&amp;size=20</text:span></text:a></text:p>
      <text:p text:style-name="Textbody"/>
      <text:p text:style-name="Textbody">Dispatch Board: Status ready for pickup</text:p>
      <text:p text:style-name="Textbody">GET →<text:s/><text:span text:style-name="T16">http://localhost:8080/api/orders/all?orderStatus=READY_FOR_PICKUP&amp;page=0&amp;size=20</text:span></text:p>
      <text:p text:style-name="Textbody"/>
      <text:h text:style-name="Heading2" text:outline-level="2">DELIVERY</text:h>
      <text:h text:style-name="Heading3" text:outline-level="3">Big picture­</text:h>
      <text:p text:style-name="Textbody">The delivery user has a sidebar with nav links that show pages such as</text:p>
      <text:p text:style-name="Textbody"><text:span text:style-name="T17">Unassigned orders</text:span><text:s/>– are orders unassigned that are confirmed by the venue restaurant,</text:p>
      <text:p text:style-name="Textbody"><text:span text:style-name="T18">ready for pickup</text:span><text:s/>– are orders which are assigned to the user and only have status “<text:span text:style-name="T19">READY_FOR_PICKUP</text:span>”,</text:p>
      <text:p text:style-name="Textbody"><text:span text:style-name="T20">On the<text:s/></text:span><text:span text:style-name="T21">way<text:s/></text:span>– orders with status “ON_THE_WAY”.</text:p>
      <text:p text:style-name="Textbody">The above three pages only display orders with a valid payment status — orders with a<text:s/><text:span text:style-name="SourceText">FAILED</text:span><text:s/>payment status are excluded. All three pages use WebSocket for real-time updates, which will be covered in later chapters.</text:p>
      <text:p text:style-name="Textbody"><text:span text:style-name="T22">D</text:span><text:span text:style-name="T23">ashboard</text:span><text:s/>— displays statistics for the user's assigned orders, including total deliveries, active orders, and a full list of their assigned orders.</text:p>
      <text:p text:style-name="Textbody"><text:span text:style-name="T24">My Orders</text:span><text:s/>— shows all orders assigned to the user, regardless of their status (including failed).</text:p>
      <text:p text:style-name="Textbody"><text:span text:style-name="T25">Earnings</text:span><text:s/>—<text:s/>displays the user's earnings.</text:p>
      <text:p text:style-name="Textbody"><text:span text:style-name="T26">Note</text:span>: The Incoming Orders, Preparation Queue, and Dispatch Board are updated in real-time via<text:s/><text:span text:style-name="T27">WebSockets</text:span>. For technical details on the<text:s/><text:span text:style-name="T28">/topic/branch/{branchId}/manager</text:span><text:s/>channel, see the<text:s/><text:a xlink:href="#_The_delivery_logic" office:target-frame-name="_top" xlink:show="replace"><text:span text:style-name="T29">We</text:span><text:span text:style-name="T30">bSo</text:span><text:bookmark-start text:name="_Hlt223550985"/><text:bookmark-start text:name="_Hlt223550986"/><text:span text:style-name="T31">c</text:span><text:bookmark-end text:name="_Hlt223550985"/><text:bookmark-end text:name="_Hlt223550986"/><text:span text:style-name="T32">ket Architecture</text:span></text:a><text:s/>chapter.</text:p>
      <text:h text:style-name="Heading3" text:outline-level="3">Changing order and payment status Business Rules</text:h>
      <text:p text:style-name="Textbody">There are strong applied business rules from the backend, such rules are:</text:p>
      <text:p text:style-name="Textbody">The user can only change the order status to these three:<text:line-break/>“ON_THE_WAY”, “DELIVERED”, “FAILED”.</text:p>
      <text:p text:style-name="Textbody">And payment status to those two:</text:p>
      <text:p text:style-name="Textbody">“<text:span text:style-name="T33">FAILED</text:span>” and “<text:span text:style-name="T34">COMPLETED</text:span>”</text:p>
      <text:p text:style-name="Textbody">If the user decides to switch to other not allowed statuses they get ForbiddenException</text:p>
      <text:soft-page-break/>
      <text:p text:style-name="Textbody">Also the order matter:<text:line-break/><text:span text:style-name="SourceText">ON_THE_WAY</text:span><text:s/>— you can only mark an order as "on the way" if it's currently<text:s/><text:span text:style-name="SourceText">READY_FOR_PICKUP</text:span>.<text:s/>Example: the driver picks it up, then goes on their way.</text:p>
      <text:p text:style-name="Textbody"><text:span text:style-name="SourceText">DELIVERED</text:span><text:span text:style-name="StrongEmphasis"><text:s/>or<text:s/></text:span><text:span text:style-name="SourceText">FAILED</text:span><text:s/>— both of these can only happen if the order is currently<text:s/><text:span text:style-name="SourceText">ON_THE_WAY</text:span>. You can't<text:s/><text:span text:style-name="T35">deliver</text:span><text:s/>or fail an order that hasn't been picked up yet.</text:p>
      <text:p text:style-name="Textbody"><text:span text:style-name="SourceText">default -&gt; false</text:span><text:s/>— any other status transition (e.g. trying to set it back to<text:s/><text:span text:style-name="SourceText">READY_FOR_PICKUP</text:span>, or applying some unrecognized status) is automatically invalid.<text:s/><text:span text:style-name="T36">Should it though???Let say a user clicked failed he got an accident but than he feels good and want to continue but can’t undue it.Still u</text:span><text:span text:style-name="T37">ncertain what to do. Overall Im enforcing this rule.</text:span></text:p>
      <text:p text:style-name="Textbody">If the payment method is card or better say POK than the delivery has no authority to change the payment method.</text:p>
      <text:p text:style-name="Textbody">The validations are located in this class</text:p>
      <text:p text:style-name="Textbody">```java</text:p>
      <text:p text:style-name="Textbody">public void validateDeliveryUpdate(Order<text:s/>order, OrderDTO orderDTO){...}</text:p>
      <text:p text:style-name="P38">// `order` represents the current entity stored in the database,</text:p>
      <text:p text:style-name="P39">// while `orderDto` contains the updated data received from the frontend.</text:p>
      <text:p text:style-name="Textbody">```</text:p>
      <text:p text:style-name="Textbody">Note: The Incoming Orders, Preparation Queue, and Dispatch Board are updated in real-time via WebSockets. For technical details on the<text:s/><text:span text:style-name="T40">/topic/branch/{branchId}/manager</text:span><text:s/>channel, see the<text:s/><text:a xlink:href="#_Branch_Manager_Channels" office:target-frame-name="_top" xlink:show="replace"><text:span text:style-name="T41">WebSocket Architecture</text:span></text:a><text:s/>chapter.</text:p>
      <text:h text:style-name="Heading3" text:outline-level="3">Unassigned Orders</text:h>
      <text:p text:style-name="Textbody">The initial fetch is this endpoint<text:line-break/>GET →<text:s/><text:a xlink:href="http://localhost:8080/api/orders/unassigned-orders?page=0&amp;size=50" office:target-frame-name="_top" xlink:show="replace">http://localhost:8080/api/orders/unassigned-orders?page=0&amp;size=50</text:a></text:p>
      <text:p text:style-name="Textbody">The process of getting the orders is simple, Im not using the “GOD” endpoint: getAll and pass the arguments because I have to<text:s/>write a lot of logic for the unassigned and better of create new one.</text:p>
      <text:p text:style-name="Textbody">The controller endpoint is getConfirmedUnassignedOrders(...)<text:line-break/>It returns a paginated list of orders, with the page size controlled by the frontend's request parameters.</text:p>
      <text:p text:style-name="Textbody">The service is straightforward — it delegates filtering entirely to the database layer, returning only orders that have no assigned delivery person and have a status of<text:s/><text:span text:style-name="SourceText">CONFIRMED</text:span>,<text:s/><text:span text:style-name="SourceText">PREPARING</text:span>, or<text:s/><text:span text:style-name="SourceText">READY_FOR_PICKUP</text:span>.</text:p>
      <text:p text:style-name="Textbody">Mapping is done through modelmapper and I manually remove reviews and set payment method to the orderDTO class because the model mapper fail to do it automatically.</text:p>
      <text:h text:style-name="Heading3" text:outline-level="3">Ready For Pickup</text:h>
      <text:p text:style-name="Normal">Two get endpoints here one to get the orders with status<text:s/><text:span text:style-name="T42">READY_FOR_PICKUP <text:s/></text:span>and<text:line-break/>countAssignedOrdersInPreparation() to get the assigned<text:s/>orders that are being prepared or are not ready to delivery specifically with status PREPERING or CONFIRMED.</text:p>
      <text:p text:style-name="Textbody"/>
      <text:soft-page-break/>
      <text:h text:style-name="Heading3" text:outline-level="3">Earnings</text:h>
      <text:p text:style-name="Textbody">To calculate the earnings of the delivery person I simply add up the 50% of the delivery cost per order if the delivery is more than 100lek, but if is less than 80lek than is 100% all the driver profit because he would not consider to take the ride.</text:p>
      <text:p text:style-name="Textbody">Example</text:p>
      <text:list text:style-name="LFO3" text:continue-numbering="true">
        <text:list-item>
          <text:p text:style-name="P43"><text:line-break/>delivery cost is 300Lek and tip 50lek the delivery profit is 150+50=200 lek for that</text:p>
        </text:list-item>
        <text:list-item>
          <text:p text:style-name="P44"><text:line-break/>70lek Delivery cost and 20lek tip than total profit is 90lek.</text:p>
        </text:list-item>
      </text:list>
      <text:p text:style-name="P45">The <text:s/><text:span text:style-name="T46">driver_earnings</text:span><text:s/>are located in the table orders and is initially calculated just after the user clicks to place the order. To enforce the business rules I implemented this function to calculate it “BigDecimal calculateDriverEarnings(..)..”</text:p>
      <text:h text:style-name="Heading1" text:outline-level="1">Helper Methods</text:h>
      <text:h text:style-name="Heading2" text:outline-level="2">IsIncomplete(Order order)</text:h>
      <text:p text:style-name="Textbody">This method is used primarily by the delivery user to filter orders that are still actionable. It returns<text:s/><text:span text:style-name="T47">true</text:span><text:s/>if the order has a status of CONFIRMED, PREPARING, or READY_FOR_PICKUP, making it eligible to be assigned to a delivery person.</text:p>
      <text:h text:style-name="P48" text:outline-level="1"/>
      <text:h text:style-name="Heading1" text:outline-level="1">WebSocket Architecture</text:h>
      <text:h text:style-name="Heading2" text:outline-level="2">Event-Driven Notification System</text:h>
      <text:p text:style-name="Normal">Instead of the "God Method" directly triggering WebSocket updates, the system uses an<text:s/><text:span text:style-name="T49">event-driven</text:span><text:s/>approach to decouple business logic from real-time notifications.</text:p>
      <text:p text:style-name="Normal">When an<text:s/>order is created or updated in the OrderService, the system publishes an internal Spring Event called OrderSavedEvent. This event carries the updated OrderDTO, the branchId, and a flag wasPreviouslyUnassigned to help track state transitions.</text:p>
      <text:p text:style-name="Normal">The WebSocketController listens for this event and acts as a router, deciding exactly who needs to receive the update based on the order's status and assignment.</text:p>
      <text:h text:style-name="Heading2" text:outline-level="2"><text:bookmark-start text:name="_Branch_Manager_Channels"/><text:bookmark-end text:name="_Branch_Manager_Channels"/>Branch Manager Channels</text:h>
      <text:p text:style-name="Normal">The branch manager needs to see orders moving through the Kanban board (Incoming, Preparation, Dispatch) in real-time.</text:p>
      <text:p text:style-name="Normal">Topic: /topic/branch/{branchId}/manager</text:p>
      <text:p text:style-name="Normal">Logic: The controller checks if the order belongs to a branch. If it does, the full OrderDTO is broadcast to this topic.</text:p>
      <text:p text:style-name="Normal">Behavior:</text:p>
      <text:p text:style-name="Normal">If status is INITIALIZED → Adds to "Incoming Orders".</text:p>
      <text:p text:style-name="Normal">If status is PREPARING → Adds to "Preparation Queue".</text:p>
      <text:soft-page-break/>
      <text:p text:style-name="Normal">If status is READY_FOR_PICKUP → Adds to "Dispatch Board".</text:p>
      <text:h text:style-name="Heading2" text:outline-level="2">Delivery Channels</text:h>
      <text:p text:style-name="Normal"><text:bookmark-start text:name="_The_delivery_logic"/><text:bookmark-end text:name="_The_delivery_logic"/>The delivery logic is split into two distinct channels to handle the "Unassigned Pool" and "Personal Assignments" securely and efficiently.</text:p>
      <text:h text:style-name="Heading3" text:outline-level="3">1. Global Unassigned Pool</text:h>
      <text:p text:style-name="Normal">This channel drives the "Unassigned Orders" page. Since delivery drivers can accept orders from any branch they are authorized for, a global topic is used.</text:p>
      <text:p text:style-name="Normal">Topic: /topic/delivery/global/unassigned</text:p>
      <text:p text:style-name="Normal">Payload logic<text:s/>(wsAction): The backend appends a wsAction field to the DTO to tell the client how to react.</text:p>
      <text:p text:style-name="Normal">ADD: Sent if the order matches the isUnassignedCriteriaMet() check (Status is CONFIRMED, PREPARING, or READY_FOR_PICKUP, and deliveryPerson is null).</text:p>
      <text:p text:style-name="Normal">REMOVE: Sent<text:s/>if the order was unassigned before the update, but is not anymore (e.g., a driver accepted it, or it was cancelled).</text:p>
      <text:p text:style-name="Normal">This ensures that as soon as a manager marks an order as "CONFIRMED", it appears instantly on all drivers' screens. Conversely, if Driver A<text:s/>accepts it, it disappears instantly from Driver B's screen via the REMOVE action.</text:p>
      <text:h text:style-name="Heading3" text:outline-level="3">2. Driver Queue</text:h>
      <text:p text:style-name="Normal">This channel drives the "My Orders", "Ready for Pickup", and "On The Way" pages.</text:p>
      <text:p text:style-name="Normal">Topic: /user/queue/updates</text:p>
      <text:p text:style-name="Normal">Security: This uses convertAndSendToUser. The<text:s/>update is sent only to the specific driver assigned to the order. Driver A cannot listen to Driver B's updates.</text:p>
      <text:p text:style-name="Normal">Logic:</text:p>
      <text:p text:style-name="Normal">If the delivery person is not null, the update is sent here.</text:p>
      <text:p text:style-name="Normal">This handles the lifecycle of the active delivery (e.g., changing status to<text:s/>ON_THE_WAY updates the driver's own dashboard).</text:p>
      <text:h text:style-name="Heading3" text:outline-level="3">Helper Methods</text:h>
      <text:h text:style-name="Heading4" text:outline-level="4">isUnassignedCriteriaMet(OrderDTO order)</text:h>
      <text:p text:style-name="Normal">This method inside the WebSocket Controller replicates the logic of the getConfirmedUnassignedOrders endpoint. It returns true only if:</text:p>
      <text:p text:style-name="Normal">The<text:s/>deliveryPerson is null.</text:p>
      <text:p text:style-name="Normal">The status is one of: CONFIRMED, PREPARING, or READY_FOR_PICKUP.</text:p>
      <text:p text:style-name="Normal">The payment status is NOT FAILED.</text:p>
      <text:p text:style-name="Normal">Integration Points</text:p>
      <text:p text:style-name="Normal">The OrderSavedEvent is triggered in two specific places in the OrderService:</text:p>
      <text:p text:style-name="Normal">updateStatus: After a status change (e.g., Manager confirms order, Driver picks up order).</text:p>
      <text:p text:style-name="Normal">createOrder: Immediately after a customer places a new order. This ensures the Branch Manager sees the "Incoming" order instantly without refreshing.</text:p>
      <text:p text:style-name="Normal"/>
      <text:soft-page-break/>
      <text:h text:style-name="Heading2" text:outline-level="2">Managing duplicate orders and payments in checkout<text:s/>flow</text:h>
      <text:p text:style-name="Normal"><draw:frame draw:style-name="a0" draw:name="Picture 1" text:anchor-type="as-char" svg:x="0in" svg:y="0in" svg:width="6.69306in" svg:height="2.76319in" style:rel-width="scale" style:rel-height="scale"><draw:image xlink:href="media/image1.png" xlink:type="simple" xlink:show="embed" xlink:actuate="onLoad"/><svg:title/><svg:desc/></draw:frame></text:p>
      <text:p text:style-name="Normal"/>
      <text:h text:style-name="Heading3" text:outline-level="3">How to know if my previous order has nothing changed</text:h>
      <text:p text:style-name="Textbody"/>
      <text:p text:style-name="Textbody">The things that can change are:</text:p>
      <text:list text:style-name="LFO4" text:continue-numbering="true">
        <text:list-item>
          <text:p text:style-name="P50">Cart items + quantities + variants</text:p>
        </text:list-item>
        <text:list-item>
          <text:p text:style-name="P51">Tip amount</text:p>
        </text:list-item>
        <text:list-item>
          <text:p text:style-name="P52">Delivery location</text:p>
        </text:list-item>
        <text:list-item>
          <text:p text:style-name="P53">Payment method\</text:p>
        </text:list-item>
      </text:list>
      <text:p text:style-name="Textbody">My solution is to store a cart hash on the order.</text:p>
      <text:p text:style-name="Textbody"/>
      <text:soft-page-break/>
      <text:h text:style-name="Heading1" text:outline-level="1">Schedulers</text:h>
      <text:h text:style-name="Heading3" text:outline-level="3">processExpiredPayments()</text:h>
      <text:h text:style-name="Heading1" text:outline-level="1">Card Payment Checkout Flow &amp; Webhook Handling</text:h>
      <text:h text:style-name="Heading1" text:outline-level="1"><draw:frame draw:style-name="a1" draw:name="Picture 3" text:anchor-type="as-char" svg:x="0in" svg:y="0in" svg:width="5.97917in" svg:height="7.30903in" style:rel-width="scale" style:rel-height="scale"><draw:image xlink:href="media/image2.png" xlink:type="simple" xlink:show="embed" xlink:actuate="onLoad"/><svg:title/><svg:desc/></draw:frame></text:h>
      <text:soft-page-break/>
      <text:h text:style-name="Heading2" text:outline-level="2">1. Overview</text:h>
      <text:p text:style-name="NormalWeb">Here is the logic for handling online card payments (via Pok), order placements, and asynchronous payment webhooks. It specifically addresses how we handle user drop-offs, cart modifications, and race conditions between our internal expiration cron jobs and the payment gateway's success callbacks.</text:p>
      <text:h text:style-name="Heading2" text:outline-level="2">2. Order Placement Flow (<text:span text:style-name="T54">placeOrder</text:span>)</text:h>
      <text:p text:style-name="NormalWeb">When a user attempts to place an order using a card payment, the system checks if they already have an existing, unpaid order for the same restaurant branch. We do this to prevent spamming the database with new orders if the user simply refreshed the page or backed out of the payment provider's screen.</text:p>
      <text:h text:style-name="Heading3" text:outline-level="3">Logic Flow for Existing Orders:</text:h>
      <text:list text:style-name="LFO5" text:continue-numbering="true">
        <text:list-item>
          <text:p text:style-name="P55"><text:span text:style-name="T56">Check for Terminal States:</text:span></text:p>
          <text:list text:continue-numbering="true">
            <text:list-item>
              <text:p text:style-name="P57">If the existing order is marked as<text:s/><text:span text:style-name="HTMLCode">FAILED</text:span><text:s/>or the payment is<text:s/><text:span text:style-name="HTMLCode">ABANDONED</text:span>, it is considered a terminal state.</text:p>
            </text:list-item>
            <text:list-item>
              <text:p text:style-name="P58"><text:span text:style-name="T59">Action:</text:span><text:s/>We ignore this order entirely and proceed to create a new one.</text:p>
            </text:list-item>
          </text:list>
        </text:list-item>
        <text:list-item>
          <text:p text:style-name="P60"><text:span text:style-name="T61">Check for Cart Modifications:</text:span></text:p>
          <text:list text:continue-numbering="true">
            <text:list-item>
              <text:p text:style-name="P62">We compare the<text:s/><text:span text:style-name="HTMLCode">cartHash</text:span><text:s/>of the current cart against the existing order's<text:s/><text:span text:style-name="HTMLCode">cartHash</text:span>.</text:p>
            </text:list-item>
            <text:list-item>
              <text:p text:style-name="P63"><text:span text:style-name="T64">If the cart HAS changed:</text:span><text:s/>We mark the old order as<text:s/><text:span text:style-name="HTMLCode">FAILED</text:span><text:s/>and its payments as<text:s/><text:span text:style-name="HTMLCode">ABANDONED</text:span>. We then fall through to create a brand new order.</text:p>
            </text:list-item>
          </text:list>
        </text:list-item>
        <text:list-item>
          <text:p text:style-name="P65"><text:span text:style-name="T66">Check Payment Link Validity (If cart is identical):</text:span></text:p>
          <text:list text:continue-numbering="true">
            <text:list-item>
              <text:p text:style-name="P67">If the existing card payment link expires in<text:s/><text:span text:style-name="T68">more than 5 minutes</text:span>, we return the existing payment link. (This ensures a good UX, giving the user plenty of time to enter their card details).</text:p>
            </text:list-item>
            <text:list-item>
              <text:p text:style-name="P69">If the link is expired (or expiring in &lt; 5 minutes), we mark that specific payment row as<text:s/><text:span text:style-name="HTMLCode">EXPIRED</text:span>, request a new payment link from the payment gateway, and attach it to the existing order.</text:p>
            </text:list-item>
          </text:list>
        </text:list-item>
      </text:list>
      <text:h text:style-name="Heading2" text:outline-level="2">3. The Expiration Cron Job</text:h>
      <text:p text:style-name="NormalWeb">A scheduled task runs regularly to clean up stale orders that users abandoned at the card checkout screen.</text:p>
      <text:list text:style-name="LFO6" text:continue-numbering="true">
        <text:list-item>
          <text:p text:style-name="P70"><text:span text:style-name="T71">What it does:</text:span><text:s/>It looks for orders in the<text:s/><text:span text:style-name="HTMLCode">INITIALIZED</text:span><text:s/>state where the card payment's<text:s/><text:span text:style-name="HTMLCode">expires_at</text:span><text:s/>timestamp has passed.</text:p>
        </text:list-item>
        <text:list-item>
          <text:p text:style-name="P72"><text:span text:style-name="T73">Action:</text:span><text:s/>It updates the order status to<text:s/><text:span text:style-name="HTMLCode">FAILED</text:span><text:s/>and the payment status to<text:s/><text:span text:style-name="HTMLCode">ABANDONED</text:span><text:s/>/<text:s/><text:span text:style-name="HTMLCode">EXPIRED</text:span>.</text:p>
        </text:list-item>
        <text:list-item>
          <text:p text:style-name="P74"><text:span text:style-name="T75">Buffer Strategy:</text:span><text:s/>To account for network latency and delayed webhooks from the payment provider, the cron job should ideally look for payments that expired a few minutes ago (e.g.,<text:s/><text:span text:style-name="HTMLCode">NOW() - INTERVAL '5 minutes'</text:span>) rather than expiring them the exact second the clock runs out.</text:p>
        </text:list-item>
      </text:list>
      <text:soft-page-break/>
      <text:h text:style-name="Heading2" text:outline-level="2">4. Webhook Handling &amp; "The Race Condition"</text:h>
      <text:p text:style-name="NormalWeb">Because card payment completion happens asynchronously off-platform, there is a known edge case:<text:s/><text:span text:style-name="T76">The Race Condition</text:span>.</text:p>
      <text:p text:style-name="NormalWeb"><text:span text:style-name="T77">The Scenario:</text:span><text:s/>A user completes their card payment at the absolute last second. The cron job runs and marks the order as<text:s/><text:span text:style-name="HTMLCode">FAILED</text:span><text:s/>just milliseconds before the success webhook arrives at our server.</text:p>
      <text:h text:style-name="Heading3" text:outline-level="3">The "Resurrecting Webhook" Strategy</text:h>
      <text:p text:style-name="NormalWeb">To solve this, we treat the payment gateway as the ultimate source of truth. If the gateway says the card was charged successfully, we honor the order, even if the cron job already killed it.</text:p>
      <text:p text:style-name="NormalWeb">When the<text:s/><text:span text:style-name="HTMLCode">processSuccessfulPayment</text:span><text:s/>webhook fires, it must enforce the following rules:</text:p>
      <text:list text:style-name="LFO7" text:continue-numbering="true">
        <text:list-item>
          <text:p text:style-name="P78"><text:span text:style-name="T79">Idempotency Guard:</text:span></text:p>
          <text:list text:continue-numbering="true">
            <text:list-item>
              <text:p text:style-name="P80">Webhooks can be delivered multiple times by the payment provider.</text:p>
            </text:list-item>
            <text:list-item>
              <text:p text:style-name="P81"><text:span text:style-name="T82">Action:</text:span><text:s/>Check if the order's<text:s/><text:span text:style-name="HTMLCode">PaymentStatus</text:span><text:s/>is already<text:s/><text:span text:style-name="HTMLCode">COMPLETED</text:span>. If yes, log it as a duplicate and halt execution to prevent double-counting analytics or sending duplicate tickets to the kitchen.</text:p>
            </text:list-item>
          </text:list>
        </text:list-item>
        <text:list-item>
          <text:p text:style-name="P83"><text:span text:style-name="T84">Order Resurrection:</text:span></text:p>
          <text:list text:continue-numbering="true">
            <text:list-item>
              <text:p text:style-name="P85">Check if the cron job already marked the<text:s/><text:span text:style-name="HTMLCode">OrderStatus</text:span><text:s/>as<text:s/><text:span text:style-name="HTMLCode">FAILED</text:span>.</text:p>
            </text:list-item>
            <text:list-item>
              <text:p text:style-name="P86"><text:span text:style-name="T87">Action:</text:span><text:s/>If<text:s/><text:span text:style-name="HTMLCode">FAILED</text:span>, overwrite it back to<text:s/><text:span text:style-name="HTMLCode">INITIALIZED</text:span><text:s/>(or your standard pre-kitchen state). Update the<text:s/><text:span text:style-name="HTMLCode">PaymentStatus</text:span><text:s/>to<text:s/><text:span text:style-name="HTMLCode">COMPLETED</text:span>.</text:p>
            </text:list-item>
          </text:list>
        </text:list-item>
        <text:list-item>
          <text:p text:style-name="P88"><text:span text:style-name="T89">Kitchen Notification:</text:span></text:p>
          <text:list text:continue-numbering="true">
            <text:list-item>
              <text:p text:style-name="P90">Resurrecting the database rows isn't enough; the restaurant needs to cook the food.</text:p>
            </text:list-item>
            <text:list-item>
              <text:p text:style-name="P91"><text:span text:style-name="T92">Action:</text:span><text:s/>Fire the<text:s/><text:span text:style-name="HTMLCode">OrderSavedEvent</text:span><text:s/>(or your equivalent notification service) to ensure the restaurant tablet rings and prints the ticket. Clear the user's cart and increment daily metrics.</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Ubuntu Sans" svg:font-family="Ubuntu Sans" style:font-family-generic="swiss" style:font-pitch="variable"/>
    <style:font-face style:name="Ubuntu Sans Mono" svg:font-family="Ubuntu Sans Mono" style:font-family-generic="swiss"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oogle Sans Text" svg:font-family="Google Sans Text" style:font-family-generic="system"/>
    <style:font-face style:name="JetBrains Mono" svg:font-family="JetBrains Mono" style:font-family-generic="roman"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style:font-name="Ubuntu Sans" style:font-name-asian="Ubuntu Sans" style:font-name-complex="Ubuntu Sans" fo:font-weight="bold" style:font-weight-asian="bold" style:font-weight-complex="bold" fo:font-size="37pt" style:font-size-asian="37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Ubuntu Sans Mono" style:font-name-asian="Ubuntu Sans Mono" style:font-name-complex="Ubuntu Sans Mono" fo:font-weight="bold" style:font-weight-asian="bold" style:font-weight-complex="bold" fo:font-size="20pt" style:font-size-asian="20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Ubuntu Sans" style:font-name-asian="Ubuntu Sans" style:font-name-complex="Ubuntu Sans" fo:font-weight="bold" style:font-weight-asian="bold" style:font-weight-complex="bold" fo:font-size="37pt" style:font-size-asian="37pt" style:font-size-complex="18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ading5Char" style:display-name="Heading 5 Char" style:family="text" style:parent-style-name="DefaultParagraphFont">
      <style:text-properties style:font-name="Calibri Light" style:font-name-asian="Times New Roman" style:font-name-complex="Mangal"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jada Mucollari</dc:creator>
    <meta:creation-date>2026-02-28T17:12:00Z</meta:creation-date>
    <dc:date>2026-03-30T22:03:00Z</dc:date>
    <meta:template xlink:href="Normal.dotm" xlink:type="simple"/>
    <meta:editing-cycles>11</meta:editing-cycles>
    <meta:editing-duration>PT77580S</meta:editing-duration>
    <meta:document-statistic meta:page-count="9" meta:paragraph-count="29" meta:word-count="2175" meta:character-count="14545" meta:row-count="103" meta:non-whitespace-character-count="12399"/>
  </office:meta>
</office:document-meta>
</file>