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08000002A88D76E8ED.png" manifest:media-type="image/png"/>
  <manifest:file-entry manifest:full-path="Pictures/100000000000016E000001A756449BC9.png" manifest:media-type="image/png"/>
  <manifest:file-entry manifest:full-path="Pictures/10000001000002E3000002ADF22B363D.png" manifest:media-type="image/png"/>
  <manifest:file-entry manifest:full-path="Pictures/1000000100000147000001750817BFBE.png" manifest:media-type="image/png"/>
  <manifest:file-entry manifest:full-path="Pictures/1000000100000429000001418735146F.png" manifest:media-type="image/png"/>
  <manifest:file-entry manifest:full-path="Pictures/1000000100000419000002354488F12F.png" manifest:media-type="image/png"/>
  <manifest:file-entry manifest:full-path="Pictures/10000001000004ED000002D9813ACC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UI Text" svg:font-family="'SF UI Text', sans-serif"/>
    <style:font-face style:name="hurme no2-webfont" svg:font-family="'hurme no2-webfont', apple-system, BlinkMacSystemFont, sans-serif"/>
  </office:font-face-decls>
  <office:automatic-styles>
    <style:style style:name="P1" style:family="paragraph" style:parent-style-name="Standard">
      <style:text-properties officeooo:paragraph-rsid="0017f973"/>
    </style:style>
    <style:style style:name="P2" style:family="paragraph" style:parent-style-name="Standard">
      <style:text-properties officeooo:rsid="0017f973" officeooo:paragraph-rsid="0017f973"/>
    </style:style>
    <style:style style:name="P3" style:family="paragraph" style:parent-style-name="Standard">
      <style:text-properties officeooo:rsid="00201e16" officeooo:paragraph-rsid="00201e16"/>
    </style:style>
    <style:style style:name="P4" style:family="paragraph" style:parent-style-name="Standard">
      <style:text-properties officeooo:rsid="001d9581" officeooo:paragraph-rsid="001d9581"/>
    </style:style>
    <style:style style:name="P5" style:family="paragraph" style:parent-style-name="Standard">
      <style:text-properties officeooo:paragraph-rsid="001d9581"/>
    </style:style>
    <style:style style:name="P6" style:family="paragraph" style:parent-style-name="Standard">
      <style:text-properties officeooo:rsid="001e5881" officeooo:paragraph-rsid="001e5881"/>
    </style:style>
    <style:style style:name="P7" style:family="paragraph" style:parent-style-name="Standard">
      <style:text-properties officeooo:rsid="001e8e76" officeooo:paragraph-rsid="001e8e76"/>
    </style:style>
    <style:style style:name="P8" style:family="paragraph" style:parent-style-name="Standard">
      <style:text-properties officeooo:rsid="002306f9" officeooo:paragraph-rsid="002306f9"/>
    </style:style>
    <style:style style:name="P9" style:family="paragraph" style:parent-style-name="Text_20_body">
      <style:text-properties officeooo:rsid="002306f9" officeooo:paragraph-rsid="002306f9"/>
    </style:style>
    <style:style style:name="P10" style:family="paragraph" style:parent-style-name="Text_20_body">
      <style:text-properties officeooo:paragraph-rsid="002306f9"/>
    </style:style>
    <style:style style:name="P11" style:family="paragraph" style:parent-style-name="Text_20_body">
      <style:text-properties officeooo:rsid="0023174f" officeooo:paragraph-rsid="0023174f"/>
    </style:style>
    <style:style style:name="P12" style:family="paragraph" style:parent-style-name="Text_20_body">
      <style:text-properties officeooo:rsid="0023fad3" officeooo:paragraph-rsid="0023fad3"/>
    </style:style>
    <style:style style:name="P13" style:family="paragraph" style:parent-style-name="Text_20_body">
      <style:text-properties officeooo:paragraph-rsid="0023fad3"/>
    </style:style>
    <style:style style:name="P14" style:family="paragraph" style:parent-style-name="Standard">
      <style:text-properties officeooo:paragraph-rsid="0026a097"/>
    </style:style>
    <style:style style:name="P15" style:family="paragraph" style:parent-style-name="Text_20_body">
      <style:text-properties officeooo:paragraph-rsid="0027dfb1"/>
    </style:style>
    <style:style style:name="P16" style:family="paragraph" style:parent-style-name="Standard">
      <style:text-properties officeooo:rsid="002112c8" officeooo:paragraph-rsid="002112c8"/>
    </style:style>
    <style:style style:name="P17" style:family="paragraph" style:parent-style-name="Standard">
      <style:paragraph-properties fo:break-before="page"/>
      <style:text-properties officeooo:rsid="002112c8" officeooo:paragraph-rsid="002112c8"/>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fo:font-weight="normal" style:font-weight-asian="normal" style:font-weight-complex="normal"/>
    </style:style>
    <style:style style:name="P20" style:family="paragraph" style:parent-style-name="Standard">
      <style:text-properties officeooo:paragraph-rsid="0030edb6"/>
    </style:style>
    <style:style style:name="P21" style:family="paragraph" style:parent-style-name="Text_20_body">
      <style:text-properties officeooo:paragraph-rsid="002df955"/>
    </style:style>
    <style:style style:name="P22" style:family="paragraph" style:parent-style-name="Text_20_body">
      <style:text-properties officeooo:rsid="002ff940" officeooo:paragraph-rsid="002ff940"/>
    </style:style>
    <style:style style:name="P23" style:family="paragraph" style:parent-style-name="Text_20_body">
      <style:text-properties officeooo:paragraph-rsid="002ff940"/>
    </style:style>
    <style:style style:name="P24" style:family="paragraph" style:parent-style-name="Text_20_body">
      <style:paragraph-properties fo:margin-top="0in" fo:margin-bottom="0in" style:contextual-spacing="false"/>
      <style:text-properties officeooo:paragraph-rsid="002ff940"/>
    </style:style>
    <style:style style:name="P25" style:family="paragraph" style:parent-style-name="Text_20_body">
      <style:text-properties fo:font-variant="normal" fo:text-transform="none" fo:color="#728188" loext:opacity="100%" style:font-name="SF UI Text" fo:font-size="11.25pt" fo:letter-spacing="normal" fo:font-style="normal" fo:font-weight="normal" officeooo:rsid="002ff940" officeooo:paragraph-rsid="002ff940"/>
    </style:style>
    <style:style style:name="P26"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style>
    <style:style style:name="P27" style:family="paragraph" style:parent-style-name="Standard">
      <style:text-properties officeooo:rsid="0026e112" officeooo:paragraph-rsid="0026e112"/>
    </style:style>
    <style:style style:name="P28" style:family="paragraph" style:parent-style-name="Standard">
      <style:text-properties officeooo:rsid="0026e112" officeooo:paragraph-rsid="0035a614"/>
    </style:style>
    <style:style style:name="P29" style:family="paragraph" style:parent-style-name="Standard">
      <style:text-properties fo:font-weight="bold" officeooo:rsid="003b1b25" officeooo:paragraph-rsid="003b1b25" style:font-weight-asian="bold" style:font-weight-complex="bold"/>
    </style:style>
    <style:style style:name="P30" style:family="paragraph" style:parent-style-name="Text_20_body">
      <style:text-properties officeooo:rsid="0034b1ba" officeooo:paragraph-rsid="0034b1ba"/>
    </style:style>
    <style:style style:name="P31" style:family="paragraph" style:parent-style-name="Text_20_body">
      <style:text-properties officeooo:rsid="00393770" officeooo:paragraph-rsid="00393770"/>
    </style:style>
    <style:style style:name="P32" style:family="paragraph" style:parent-style-name="Text_20_body">
      <style:text-properties officeooo:rsid="003b1b25" officeooo:paragraph-rsid="003b1b25"/>
    </style:style>
    <style:style style:name="P33" style:family="paragraph" style:parent-style-name="Heading_20_2">
      <style:text-properties officeooo:rsid="00201e16" officeooo:paragraph-rsid="00201e16"/>
    </style:style>
    <style:style style:name="P34" style:family="paragraph" style:parent-style-name="Heading_20_2">
      <style:text-properties officeooo:paragraph-rsid="0027dfb1"/>
    </style:style>
    <style:style style:name="P35" style:family="paragraph" style:parent-style-name="Heading_20_2">
      <style:text-properties officeooo:paragraph-rsid="0026a097"/>
    </style:style>
    <style:style style:name="P36" style:family="paragraph" style:parent-style-name="Heading_20_3">
      <style:text-properties fo:font-size="13pt" style:font-size-asian="13pt" style:font-size-complex="13pt"/>
    </style:style>
    <style:style style:name="P37" style:family="paragraph" style:parent-style-name="Heading_20_4">
      <style:text-properties officeooo:paragraph-rsid="0035ccd9"/>
    </style:style>
    <style:style style:name="P38" style:family="paragraph" style:parent-style-name="Standard">
      <style:text-properties officeooo:rsid="0035a614" officeooo:paragraph-rsid="0035a614"/>
    </style:style>
    <style:style style:name="P39" style:family="paragraph" style:parent-style-name="Text_20_body" style:list-style-name="L1">
      <style:paragraph-properties fo:margin-top="0in" fo:margin-bottom="0in" style:contextual-spacing="false"/>
    </style:style>
    <style:style style:name="P40" style:family="paragraph" style:parent-style-name="Text_20_body" style:list-style-name="L2">
      <style:paragraph-properties fo:margin-top="0in" fo:margin-bottom="0in" style:contextual-spacing="false"/>
    </style:style>
    <style:style style:name="P41" style:family="paragraph" style:parent-style-name="Text_20_body" style:list-style-name="L3">
      <style:paragraph-properties fo:margin-top="0in" fo:margin-bottom="0in" style:contextual-spacing="false"/>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5">
      <style:paragraph-properties fo:margin-top="0in" fo:margin-bottom="0in" style:contextual-spacing="false"/>
    </style:style>
    <style:style style:name="P45" style:family="paragraph" style:parent-style-name="Text_20_body" style:list-style-name="L5">
      <style:paragraph-properties fo:margin-top="0in" fo:margin-bottom="0in" style:contextual-spacing="false"/>
      <style:text-properties officeooo:rsid="002b378a" officeooo:paragraph-rsid="002b378a"/>
    </style:style>
    <style:style style:name="P46" style:family="paragraph" style:parent-style-name="Text_20_body" style:list-style-name="L6">
      <style:paragraph-properties fo:margin-top="0in" fo:margin-bottom="0in" style:contextual-spacing="false"/>
    </style:style>
    <style:style style:name="P47" style:family="paragraph" style:parent-style-name="Text_20_body" style:list-style-name="L7">
      <style:paragraph-properties fo:margin-top="0in" fo:margin-bottom="0in" style:contextual-spacing="false"/>
    </style:style>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9">
      <style:paragraph-properties fo:margin-top="0in" fo:margin-bottom="0in" style:contextual-spacing="false"/>
    </style:style>
    <style:style style:name="P51" style:family="paragraph" style:parent-style-name="Text_20_body" style:list-style-name="L10"/>
    <style:style style:name="P52" style:family="paragraph" style:parent-style-name="Text_20_body" style:list-style-name="L10">
      <style:paragraph-properties fo:margin-top="0in" fo:margin-bottom="0in" style:contextual-spacing="false"/>
    </style:style>
    <style:style style:name="P53" style:family="paragraph" style:parent-style-name="Text_20_body" style:list-style-name="L11">
      <style:paragraph-properties fo:margin-top="0in" fo:margin-bottom="0in" style:contextual-spacing="false"/>
    </style:style>
    <style:style style:name="P54" style:family="paragraph" style:parent-style-name="Text_20_body" style:list-style-name="L11">
      <style:text-properties officeooo:paragraph-rsid="0037b924"/>
    </style:style>
    <style:style style:name="P55" style:family="paragraph" style:parent-style-name="Text_20_body">
      <style:text-properties officeooo:rsid="0043531a" officeooo:paragraph-rsid="0043531a"/>
    </style:style>
    <style:style style:name="P56" style:family="paragraph" style:parent-style-name="Text_20_body">
      <style:text-properties officeooo:paragraph-rsid="0043f4d8"/>
    </style:style>
    <style:style style:name="P57" style:family="paragraph" style:parent-style-name="Text_20_body" style:list-style-name="L14"/>
    <style:style style:name="P58" style:family="paragraph" style:parent-style-name="Text_20_body" style:list-style-name="L14">
      <style:paragraph-properties fo:margin-top="0in" fo:margin-bottom="0in" style:contextual-spacing="false"/>
    </style:style>
    <style:style style:name="P59" style:family="paragraph" style:parent-style-name="Text_20_body">
      <style:text-properties officeooo:rsid="0044e819" officeooo:paragraph-rsid="0044e819"/>
    </style:style>
    <style:style style:name="P60" style:family="paragraph" style:parent-style-name="Text_20_body" style:list-style-name="L15"/>
    <style:style style:name="P61" style:family="paragraph" style:parent-style-name="Text_20_body" style:list-style-name="L15">
      <style:paragraph-properties fo:margin-top="0in" fo:margin-bottom="0in" style:contextual-spacing="false"/>
    </style:style>
    <style:style style:name="T1" style:family="text">
      <style:text-properties officeooo:rsid="0017f97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7f973" style:font-weight-asian="bold" style:font-weight-complex="bold"/>
    </style:style>
    <style:style style:name="T5" style:family="text">
      <style:text-properties fo:font-weight="bold" officeooo:rsid="00460f34"/>
    </style:style>
    <style:style style:name="T6" style:family="text">
      <style:text-properties officeooo:rsid="001af031"/>
    </style:style>
    <style:style style:name="T7" style:family="text">
      <style:text-properties officeooo:rsid="001d9581"/>
    </style:style>
    <style:style style:name="T8" style:family="text">
      <style:text-properties officeooo:rsid="001e5881"/>
    </style:style>
    <style:style style:name="T9" style:family="text">
      <style:text-properties fo:font-weight="normal" style:font-weight-asian="normal" style:font-weight-complex="normal"/>
    </style:style>
    <style:style style:name="T10" style:family="text">
      <style:text-properties officeooo:rsid="001e8e76"/>
    </style:style>
    <style:style style:name="T11" style:family="text">
      <style:text-properties officeooo:rsid="00201e16"/>
    </style:style>
    <style:style style:name="T12" style:family="text">
      <style:text-properties officeooo:rsid="002112c8"/>
    </style:style>
    <style:style style:name="T13" style:family="text">
      <style:text-properties officeooo:rsid="002306f9"/>
    </style:style>
    <style:style style:name="T14" style:family="text">
      <style:text-properties fo:font-size="10pt" style:font-size-asian="8.75pt" style:font-size-complex="10pt"/>
    </style:style>
    <style:style style:name="T15" style:family="text">
      <style:text-properties fo:font-size="10pt" officeooo:rsid="002306f9" style:font-size-asian="8.75pt" style:font-size-complex="10pt"/>
    </style:style>
    <style:style style:name="T16" style:family="text">
      <style:text-properties officeooo:rsid="0026a097"/>
    </style:style>
    <style:style style:name="T17" style:family="text">
      <style:text-properties officeooo:rsid="0026e112"/>
    </style:style>
    <style:style style:name="T18" style:family="text">
      <style:text-properties officeooo:rsid="002df955"/>
    </style:style>
    <style:style style:name="T19" style:family="text">
      <style:text-properties officeooo:rsid="002ff940"/>
    </style:style>
    <style:style style:name="T20" style:family="text">
      <style:text-properties fo:font-variant="normal" fo:text-transform="none" fo:color="#728188" loext:opacity="100%" style:font-name="SF UI Text" fo:font-size="11.25pt" fo:letter-spacing="normal" fo:font-style="normal" fo:font-weight="normal"/>
    </style:style>
    <style:style style:name="T21" style:family="text">
      <style:text-properties fo:font-variant="normal" fo:text-transform="none" fo:color="#728188" loext:opacity="100%" style:font-name="SF UI Text" fo:font-size="11.25pt" fo:letter-spacing="normal" fo:font-style="normal" fo:font-weight="bold"/>
    </style:style>
    <style:style style:name="T22" style:family="text">
      <style:text-properties fo:font-size="13pt" style:font-size-asian="13pt" style:font-size-complex="13pt"/>
    </style:style>
    <style:style style:name="T23" style:family="text">
      <style:text-properties fo:font-size="13pt" officeooo:rsid="002ff940" style:font-size-asian="13pt" style:font-size-complex="13pt"/>
    </style:style>
    <style:style style:name="T24" style:family="text">
      <style:text-properties officeooo:rsid="0030edb6"/>
    </style:style>
    <style:style style:name="T25" style:family="text">
      <style:text-properties officeooo:rsid="0034b1ba"/>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5pt" fo:font-weight="bold" style:font-size-asian="15pt" style:font-weight-asian="bold" style:font-size-complex="15pt" style:font-weight-complex="bold"/>
    </style:style>
    <style:style style:name="T28" style:family="text">
      <style:text-properties officeooo:rsid="0043531a"/>
    </style:style>
    <style:style style:name="T29" style:family="text">
      <style:text-properties officeooo:rsid="0043f4d8"/>
    </style:style>
    <style:style style:name="T30" style:family="text">
      <style:text-properties officeooo:rsid="0044e819"/>
    </style:style>
    <style:style style:name="T31" style:family="text">
      <style:text-properties officeooo:rsid="00474b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8">f</text:span>iaas -&gt; infrastructure as a service (VM you can control up to os)</text:p>
      <text:p text:style-name="Standard">paas -&gt; platform as a service (Azure App Service you manage App code)</text:p>
      <text:p text:style-name="Standard">saas -&gt; software as a service (Microsoft 365 you manage userSettingsf)</text:p>
      <text:p text:style-name="Standard"><draw:frame draw:style-name="fr2" draw:name="Image2" text:anchor-type="char" svg:width="6.6929in" svg:height="3.8689in" draw:z-index="1"><draw:image xlink:href="Pictures/10000001000004ED000002D9813ACC71.png" xlink:type="simple" xlink:show="embed" xlink:actuate="onLoad" draw:mime-type="image/png"/></draw:frame></text:p>
      <text:p text:style-name="Standard"/>
      <text:h text:style-name="Heading_20_2" text:outline-level="2">**CLOUD MODEL**</text:h>
      <text:p text:style-name="Standard">private cloud -&gt; most of the time on premises but tools like Azure Arc help</text:p>
      <text:p text:style-name="Standard">public cloud -&gt; services like vm server</text:p>
      <text:p text:style-name="Standard">hybrid cloud -&gt; combination of private + public cloud. Some resources stay on-premises, while others run in the public cloud (like Microsoft Azure) and both <text:s/><text:tab/><text:tab/><text:tab/>environments are connected.</text:p>
      <text:p text:style-name="Standard"/>
      <text:h text:style-name="Heading_20_4" text:outline-level="4">expenditure model</text:h>
      <text:p text:style-name="Standard">(CapEx) Capital expenditure -&gt; initial cost of buying something <text:span text:style-name="T6">(buying inferstructure like computers or licence initially)</text:span></text:p>
      <text:p text:style-name="P20">operational expenditure (OpEx) -&gt; more like cloud -&gt;spending money on services or products over time <text:span text:style-name="T6">as you use it – <text:tab/></text:span></text:p>
      <text:p text:style-name="P20"><text:span text:style-name="T24"><text:tab/>the more you use it more you spend -&gt;</text:span><text:span text:style-name="T6">consumption based </text:span><text:span text:style-name="T24">(</text:span>Serverless<text:span text:style-name="T24">)</text:span></text:p>
      <text:p text:style-name="P20"><text:tab/><text:span text:style-name="T24">the usage does not matter but you pay for how long you rent it → pay as you go model (iaas)</text:span></text:p>
      <text:p text:style-name="Standard"/>
      <text:p text:style-name="Standard">--------------------------------</text:p>
      <text:h text:style-name="Heading_20_2" text:outline-level="2">SCAILING</text:h>
      <text:p text:style-name="Standard">Vertical scaling is focused on increasing or decreasing the capabilities of resources (more ram, more cpu power). </text:p>
      <text:p text:style-name="Standard">Horizontal scaling is adding or subtracting the number of resources (more <text:span text:style-name="T6">vm’s</text:span>).</text:p>
      <text:p text:style-name="Standard">--------------------------------</text:p>
      <text:h text:style-name="Heading_20_3" text:outline-level="3"><text:soft-page-break/>RELIABILITY</text:h>
      <text:p text:style-name="P4">-auto healing</text:p>
      <text:p text:style-name="P4">-storage <text:s/>(min 3 copies of data)</text:p>
      <text:p text:style-name="P4">-auto scale </text:p>
      <text:p text:style-name="P4">-SLA (99.99..%)</text:p>
      <text:p text:style-name="P4">-<text:span text:style-name="T8">Design for failure</text:span></text:p>
      <text:p text:style-name="P5"><text:span text:style-name="T7">-</text:span><text:span text:style-name="T8">AZURE MONITOR -collects, analyzes, and acts on telemetry data from Azure, hybrid, and on-premises environments</text:span></text:p>
      <text:p text:style-name="P5"/>
      <text:p text:style-name="P5"/>
      <text:h text:style-name="Heading_20_3" text:outline-level="3">PREDICTABILITY</text:h>
      <text:p text:style-name="P6">-SKU (example azure compute unit <text:span text:style-name="T3">acu </text:span><text:span text:style-name="T9">for </text:span>VM which tell amount of process power it uses, certain amount of memory, certain iops &amp; throughput limit for storage)</text:p>
      <text:p text:style-name="P6">-<text:span text:style-name="T10">Behaviour exmple: api, certain tools, prodictable price based on region </text:span></text:p>
      <text:p text:style-name="P7">-use template like terraform <text:s text:c="2"/></text:p>
      <text:p text:style-name="P7"><text:tab/>-automation (take out human buttons) like mantinace activites </text:p>
      <text:p text:style-name="P7"><text:tab/>-devops ci/cd </text:p>
      <text:p text:style-name="Standard"/>
      <text:p text:style-name="Standard">----------------</text:p>
      <text:p text:style-name="Standard">Management of the cloud -&gt; scale resource deployment based on need...monitor...Deploy resources..etc (azure does it automatically for me)</text:p>
      <text:p text:style-name="Standard">Management in the cloud-&gt; api, powershell, through webportal (my manual control in the resources)</text:p>
      <text:p text:style-name="P4"/>
      <text:p text:style-name="Standard">------------------------------</text:p>
      <text:h text:style-name="Heading_20_2" text:outline-level="2">REASON FOR REGION PAIRS</text:h>
      <text:p text:style-name="P3">-Performance</text:p>
      <text:p text:style-name="P3">-Regulatory</text:p>
      <text:p text:style-name="P3">-DR resiliency (disaster recovery and IT resilience)</text:p>
      <text:p text:style-name="P3"/>
      <text:p text:style-name="P3"><draw:frame draw:style-name="fr3" draw:name="Image3" text:anchor-type="char" svg:width="6.6929in" svg:height="3.6047in" draw:z-index="2"><draw:image xlink:href="Pictures/1000000100000419000002354488F12F.png" xlink:type="simple" xlink:show="embed" xlink:actuate="onLoad" draw:mime-type="image/png"/></draw:frame></text:p>
      <text:p text:style-name="Standard"><text:soft-page-break/>-----------------------------</text:p>
      <text:p text:style-name="Standard">Zonal services: You pin the resource to a specific zone (for example, VMs, managed disks, IP addresses).</text:p>
      <text:p text:style-name="Standard">Zone-redundant services: The platform replicates automatically across zones (for example, zone-redundant storage, SQL Database).</text:p>
      <text:p text:style-name="Standard">Non-regional services: always available, survives even full region outages</text:p>
      <text:p text:style-name="Standard"/>
      <text:p text:style-name="Standard">----------------------------</text:p>
      <text:h text:style-name="P33" text:outline-level="2">Benefits of availability zones</text:h>
      <text:p text:style-name="P3">FIRSTLY there are 3 availability zones per region</text:p>
      <text:p text:style-name="P3"><draw:frame draw:style-name="fr1" draw:name="Image4" text:anchor-type="char" svg:x="-0.0366in" svg:y="0.1736in" svg:width="2.7252in" svg:height="3.1083in" draw:z-index="3"><draw:image xlink:href="Pictures/1000000100000147000001750817BFBE.png" xlink:type="simple" xlink:show="embed" xlink:actuate="onLoad" draw:mime-type="image/png"/></draw:frame></text:p>
      <text:p text:style-name="Standard">Availability Zone-&gt;If <text:span text:style-name="T12">Datacenter</text:span> <text:span text:style-name="T12">A</text:span> catches fire → your app is still running in <text:span text:style-name="T12">Datacenter B</text:span> <text:span text:style-name="T12">or C</text:span>.</text:p>
      <text:p text:style-name="Standard">Now imagine the entire city floods. All 3 <text:span text:style-name="T12">zones</text:span> go down.</text:p>
      <text:p text:style-name="Standard">**SOLUTION**</text:p>
      <text:p text:style-name="Standard">Region Pair:</text:p>
      <text:p text:style-name="Standard">West US <text:s/>◄──────────► East US</text:p>
      <text:p text:style-name="Standard"><text:s text:c="2"/>(if this dies) <text:s text:c="7"/>(this takes over)</text:p>
      <text:p text:style-name="Standard">If a single server rack loses power or a single switch dies -&gt; Availability Sets protect you. (This ensures your virtual machines are spread across different physical racks within the same datacenter).</text:p>
      <text:p text:style-name="Standard"/>
      <text:p text:style-name="Standard">Most pairs are bidirectional <text:span text:style-name="T11">and in their geopolitical zone</text:span>(each backs the other up)</text:p>
      <text:p text:style-name="Standard">Brazil South is *unique* — paired with South Central US, which does NOT pair back to Brazil South</text:p>
      <text:p text:style-name="Standard">West India is also one-directional</text:p>
      <text:p text:style-name="Standard"/>
      <text:h text:style-name="Heading_20_2" text:outline-level="2">BENEFITS AND USAGE OF SUBSCRIPTIONS</text:h>
      <text:p text:style-name="P10"><text:span text:style-name="T13">AZURE ACTIVE DIRECTORY -&gt; (AZURE AD) ”secure instance of Microsoft Entra ID which </text:span><text:span text:style-name="T14">serves as a master container for </text:span><text:span text:style-name="Strong_20_Emphasis"><text:span text:style-name="T14">users, apps, and resources</text:span></text:span><text:span text:style-name="T14">, ensuring isolation from other </text:span><text:span text:style-name="Strong_20_Emphasis"><text:span text:style-name="T14">customers</text:span></text:span><text:span text:style-name="Strong_20_Emphasis"><text:span text:style-name="T15">”</text:span></text:span></text:p>
      <text:p text:style-name="P9">AZURE AD</text:p>
      <text:p text:style-name="P8">└─USERS</text:p>
      <text:p text:style-name="P8">└─GROUPS</text:p>
      <text:p text:style-name="P8">└─DEVICES</text:p>
      <text:p text:style-name="P9">Each subscription trusts one and only one azure ad tenant</text:p>
      <text:p text:style-name="P9">azure ad tenant does not live inside subscription but is separate</text:p>
      <text:p text:style-name="P11">IN subscription I can apply </text:p>
      <text:p text:style-name="P11">-BUDGET</text:p>
      <text:p text:style-name="P11">-Billings</text:p>
      <text:p text:style-name="P11">-TAGS</text:p>
      <text:p text:style-name="P11">-RBAC</text:p>
      <text:p text:style-name="P11"><text:soft-page-break/>-POLICY</text:p>
      <text:p text:style-name="P11">EVERYTHING APPLYING TO SUBSCRIPTIONS GET APPLIED TO <text:span text:style-name="T3">RESOURCES GROUP</text:span> AND THEN INTO ACTUAL <text:span text:style-name="T3">RESOURCES</text:span></text:p>
      <text:h text:style-name="Heading_20_2" text:outline-level="2">Management Groups</text:h>
      <text:p text:style-name="P11">Tenant</text:p>
      <text:p text:style-name="P11">└── Management Groups</text:p>
      <text:p text:style-name="P11"><text:s text:c="5"/>└── Subscriptions</text:p>
      <text:p text:style-name="P11"><text:s text:c="10"/>└── Resource Groups</text:p>
      <text:p text:style-name="P11"><text:s text:c="15"/>└── Resources</text:p>
      <text:p text:style-name="P12"><draw:frame draw:style-name="fr2" draw:name="Image5" text:anchor-type="char" svg:width="6.6929in" svg:height="2.0165in" draw:z-index="4"><draw:image xlink:href="Pictures/1000000100000429000001418735146F.png" xlink:type="simple" xlink:show="embed" xlink:actuate="onLoad" draw:mime-type="image/png"/></draw:frame>what can I DO in management groups??</text:p>
      <text:p text:style-name="P12">-BUGET</text:p>
      <text:p text:style-name="P12">-RBAC</text:p>
      <text:p text:style-name="P12">-POLICY</text:p>
      <text:p text:style-name="P13">----</text:p>
      <text:p text:style-name="Standard">Management Groups</text:p>
      <text:p text:style-name="Standard">└── Subscriptions</text:p>
      <text:p text:style-name="Standard"><text:s text:c="6"/>└── Resource Groups</text:p>
      <text:p text:style-name="Standard"><text:s text:c="12"/>└── Resources (VMs, DBs, App Services...)</text:p>
      <text:p text:style-name="Standard"><text:s text:c="12"/></text:p>
      <text:p text:style-name="Standard">TechCorp Azure Account</text:p>
      <text:p text:style-name="Standard">├── Subscription: Development</text:p>
      <text:p text:style-name="Standard">├── Subscription: Production <text:s/></text:p>
      <text:p text:style-name="Standard">└── Subscription: Finance</text:p>
      <text:p text:style-name="Standard"/>
      <text:p text:style-name="Standard">Billing:Separate invoices per subscription, track costs</text:p>
      <text:p text:style-name="Standard">Access control: Different policies per subscription</text:p>
      <text:p text:style-name="Standard"/>
      <text:p text:style-name="Standard">managment groups example</text:p>
      <text:p text:style-name="Standard">GlobalCorp operates in multiple countries with multiple departments. They have tons of subscriptions.</text:p>
      <text:p text:style-name="Standard"/>
      <text:h text:style-name="Heading_20_2" text:outline-level="2"><text:soft-page-break/>AZURE RESOURCE MANAGER</text:h>
      <text:p text:style-name="Text_20_body">ARM is the actual deployment and management service for Azure. </text:p>
      <text:p text:style-name="Text_20_body">A single interface (via Portal, PowerShell, CLI, or API) to manage all Azure resources.</text:p>
      <text:p text:style-name="P18">so when i manually try to add a vm from azure website this will be translated into a json format and go through arm!</text:p>
      <text:p text:style-name="Standard">1. The Unified API Gateway</text:p>
      <text:p text:style-name="P14"><text:span text:style-name="T16">when you are interacting with azure </text:span>your request is sent to the Azure Resource Manager API. ARM authenticates and authorizes the request, and then routes it to the correct underlying service (like Compute, Storage, or Network)</text:p>
      <text:p text:style-name="Standard">2. Infrastructure as Code : <text:span text:style-name="T16">json files -&gt;</text:span>ARM Templates</text:p>
      <text:p text:style-name="P14"><text:span text:style-name="T16">3.</text:span>ARM introduces the concept of <text:span text:style-name="T2">Resource Groups</text:span>.</text:p>
      <text:p text:style-name="P14"><text:span text:style-name="T16">4.</text:span>ARM allows you to apply metadata tags (key-value pairs) to your resources. For example, you could tag resources with <text:span text:style-name="Source_20_Text">Environment: Production</text:span> or <text:span text:style-name="Source_20_Text">Department: Finance</text:span>.</text:p>
      <text:p text:style-name="P14"/>
      <text:p text:style-name="P29">TAGS → tags are not automatically inherited</text:p>
      <text:h text:style-name="P34" text:outline-level="2">Azure arc</text:h>
      <text:p text:style-name="P15"><text:span text:style-name="T17">-<text:line-break/>what it does: </text:span><text:span text:style-name="T9">Azure Arc extends Azure Resource Manager (ARM) to resources that do not live in Azure.</text:span></text:p>
      <text:p text:style-name="P19">It allows you to project your external infrastructure into the Azure portal so you can manage, govern, and secure everything from a single control plane, exactly as if those external resources were native Azure resources. </text:p>
      <text:p text:style-name="Text_20_body"><text:span text:style-name="T9"/></text:p>
      <text:h text:style-name="P35" text:outline-level="2">&gt;&gt;Describe Azure storage services</text:h>
      <text:p text:style-name="Standard">types of data</text:p>
      <text:p text:style-name="Standard"><text:span text:style-name="T4">&gt;</text:span><text:span text:style-name="T3">structured data</text:span> -&gt; like rational db</text:p>
      <text:p text:style-name="Standard">&gt;<text:span text:style-name="T3">semi-structured data</text:span> -&gt; like non rational db</text:p>
      <text:p text:style-name="Standard">&gt;<text:span text:style-name="T3">unstructured data</text:span> -&gt; photo video text, exe... they dont follow structure that can represent any kind of data (azure blob storage)<draw:frame draw:style-name="fr1" draw:name="Image1" text:anchor-type="char" svg:x="4.9854in" svg:y="0.2252in" svg:width="1.9256in" svg:height="1.7846in" draw:z-index="0"><draw:image xlink:href="Pictures/10000001000002E3000002ADF22B363D.png" xlink:type="simple" xlink:show="embed" xlink:actuate="onLoad" draw:mime-type="image/png"/></draw:frame></text:p>
      <text:p text:style-name="Standard"><text:tab/></text:p>
      <text:p text:style-name="Standard"><text:tab/>Blob mean for binary large object <text:s/></text:p>
      <text:p text:style-name="Standard"><text:tab/>blob storage </text:p>
      <text:p text:style-name="P1"><text:tab/><text:tab/>└blob container </text:p>
      <text:p text:style-name="P1"><text:tab/><text:tab/><text:tab/>└blobs</text:p>
      <text:p text:style-name="P1"/>
      <text:p text:style-name="Standard"><text:tab/><text:tab/><text:tab/></text:p>
      <text:p text:style-name="Standard"><text:tab/>three storing tiers</text:p>
      <text:p text:style-name="Standard"><text:tab/><text:tab/>hot-&gt; frequent asked data *fastest* (images for website)</text:p>
      <text:p text:style-name="Standard"><text:tab/><text:tab/>cool tiers -&gt; less frequent example usage: backups of app database <text:s/></text:p>
      <text:p text:style-name="Standard"><text:tab/><text:tab/>archive -&gt; store here if you rarely need those files </text:p>
      <text:list text:style-name="L1">
        <text:list-item>
          <text:p text:style-name="P39"><text:span text:style-name="Strong_20_Emphasis">LRS (Locally Redundant Storage)</text:span> → copies in one datacenter </text:p>
        </text:list-item>
      </text:list>
      <text:list text:style-name="L2">
        <text:list-item>
          <text:p text:style-name="P40"><text:span text:style-name="Strong_20_Emphasis">ZRS (Zone-Redundant Storage)</text:span> → across availability zones </text:p>
        </text:list-item>
      </text:list>
      <text:list text:style-name="L3">
        <text:list-item>
          <text:p text:style-name="P41"><text:span text:style-name="Strong_20_Emphasis">GRS (Geo-Redundant Storage)</text:span> → to another region </text:p>
        </text:list-item>
      </text:list>
      <text:list text:style-name="L4">
        <text:list-item>
          <text:p text:style-name="P42"><text:soft-page-break/><text:span text:style-name="Strong_20_Emphasis">RA-GRS / RA-GZRS</text:span> → same as above but with read access to backup region</text:p>
        </text:list-item>
      </text:list>
      <text:list text:style-name="L5">
        <text:list-header>
          <text:p text:style-name="P45">You will pay for the data you save for this duration:</text:p>
        </text:list-header>
        <text:list-item>
          <text:p text:style-name="P44">Hot → no commitment </text:p>
        </text:list-item>
        <text:list-item>
          <text:p text:style-name="P44">Cool → 1 month commitment </text:p>
        </text:list-item>
        <text:list-item>
          <text:p text:style-name="P44">Cold → ~3 months commitment </text:p>
        </text:list-item>
        <text:list-item>
          <text:p text:style-name="P43">Archive → 6 months commitment </text:p>
        </text:list-item>
      </text:list>
      <text:h text:style-name="Heading_20_3" text:outline-level="3">Azure Migrate</text:h>
      <text:p text:style-name="Text_20_body"><draw:frame draw:style-name="fr2" draw:name="Image6" text:anchor-type="char" svg:width="6.6929in" svg:height="2.5283in" draw:z-index="5"><draw:image xlink:href="Pictures/1000000000000708000002A88D76E8ED.png" xlink:type="simple" xlink:show="embed" xlink:actuate="onLoad" draw:mime-type="image/png"/></draw:frame></text:p>
      <text:p text:style-name="Standard">-----------------</text:p>
      <text:p text:style-name="Standard">Azure Queue Stroage (small service) if you have apps that has several tasks to be completed <text:span text:style-name="T1">and each free task might need some time to complete. You can put those to azure queue as separate messages. This will allow background services to pick those messages from the queue at they own pace, and let the proccess those async. </text:span></text:p>
      <text:p text:style-name="P2">So its job is to store small pieces of data so you can build scalable async proccessing</text:p>
      <text:p text:style-name="Standard"/>
      <text:h text:style-name="Heading_20_2" text:outline-level="2">VPN</text:h>
      <text:p text:style-name="P21">An <text:span text:style-name="Strong_20_Emphasis">Azure VPN</text:span> securely connects networks over the internet using <text:span text:style-name="Strong_20_Emphasis">encrypted tunnels</text:span>.<text:line-break/>It allows safe communication between:</text:p>
      <text:list text:style-name="L6">
        <text:list-item>
          <text:p text:style-name="P46">On-premises networks </text:p>
        </text:list-item>
      </text:list>
      <text:list text:style-name="L7">
        <text:list-item>
          <text:p text:style-name="P47">Azure virtual networks (VNets) </text:p>
        </text:list-item>
      </text:list>
      <text:list text:style-name="L8">
        <text:list-item>
          <text:p text:style-name="P48">Individual devices</text:p>
        </text:list-item>
      </text:list>
      <text:h text:style-name="P36" text:outline-level="3">VPN Gateway (Core Component)</text:h>
      <text:p text:style-name="P24"><text:span text:style-name="T22"><text:s/></text:span><text:span text:style-name="T23">Uses secure </text:span><text:span text:style-name="T22">IPsec/IKE VPN tunnel</text:span></text:p>
      <text:p text:style-name="Text_20_body">A <text:span text:style-name="Strong_20_Emphasis">VPN Gateway</text:span> is deployed in a VNet and enables 3 connection types:</text:p>
      <text:list text:style-name="L9">
        <text:list-item>
          <text:p text:style-name="P50"><text:span text:style-name="Strong_20_Emphasis">Site-to-Site (S2S):</text:span> On-premises ↔ Azure </text:p>
        </text:list-item>
        <text:list-item>
          <text:p text:style-name="P50"><text:span text:style-name="Strong_20_Emphasis">Point-to-Site (P2S):</text:span> Individual device ↔ Azure </text:p>
        </text:list-item>
        <text:list-item>
          <text:p text:style-name="P49"><text:span text:style-name="Strong_20_Emphasis">VNet-to-VNet:</text:span> Azure network ↔ Azure network </text:p>
        </text:list-item>
      </text:list>
      <text:p text:style-name="Text_20_body">Key facts:</text:p>
      <text:list text:style-name="L10">
        <text:list-item>
          <text:p text:style-name="P52"><text:soft-page-break/>Only <text:span text:style-name="Strong_20_Emphasis">1 gateway per VNet</text:span> </text:p>
        </text:list-item>
        <text:list-item>
          <text:p text:style-name="P52">Can connect to <text:span text:style-name="Strong_20_Emphasis">multiple locations</text:span> </text:p>
        </text:list-item>
        <text:list-item>
          <text:p text:style-name="P51">All traffic is <text:span text:style-name="Strong_20_Emphasis">encrypted</text:span> </text:p>
        </text:list-item>
      </text:list>
      <text:h text:style-name="Heading_20_3" text:outline-level="3">ExpressRoute </text:h>
      <text:p text:style-name="P23"><text:span text:style-name="T19">need private cable installed by internet companies specifically for this purpuse,</text:span><text:span text:style-name="T2">private, dedicated, and highly secure physical connection</text:span> between your company's on-premises datacenter and the Azure cloud.</text:p>
      <text:p text:style-name="P22">Is mainly for large enterprise compaines</text:p>
      <text:p text:style-name="P22"/>
      <text:h text:style-name="Heading_20_2" text:outline-level="2">Azure RBAC</text:h>
      <text:p text:style-name="P25">Role assignments are the way you control access to Azure resources.</text:p>
      <text:p text:style-name="P26"><text:span text:style-name="T20">The</text:span><text:span text:style-name="Strong_20_Emphasis"><text:span text:style-name="T20"> </text:span></text:span><text:span text:style-name="Strong_20_Emphasis"><text:span text:style-name="T21">Contributor role</text:span></text:span><text:span text:style-name="T20"> grants you full access to manage all resources but does not allow you to assign roles in Azure RBAC.</text:span></text:p>
      <text:p text:style-name="P26"><text:span text:style-name="T20">The</text:span><text:span text:style-name="Strong_20_Emphasis"><text:span text:style-name="T20"> </text:span></text:span><text:span text:style-name="Strong_20_Emphasis"><text:span text:style-name="T21">Owner role</text:span></text:span><text:span text:style-name="T20"> lets you manage everything, including access to resources and the contributor’s role. It grants you full access to manage all resources, including the ability to assign roles in Azure RBAC.</text:span></text:p>
      <text:p text:style-name="P26"><text:span text:style-name="Strong_20_Emphasis"><text:span text:style-name="T21">Virtual Machine Contributor role</text:span></text:span><text:span text:style-name="T20"> lets you manage virtual machines, but not access to them, and not the virtual network or storage account they’re connected to.</text:span></text:p>
      <text:p text:style-name="P26"><text:span text:style-name="T20">The</text:span><text:span text:style-name="Strong_20_Emphasis"><text:span text:style-name="T20"> </text:span></text:span><text:span text:style-name="Strong_20_Emphasis"><text:span text:style-name="T21">Reader role</text:span></text:span><text:span text:style-name="T20"> lets you view everything, but not make any changes.</text:span></text:p>
      <text:p text:style-name="Text_20_body">Microsoft Defender for Cloud -&gt;evaluate regulatory compliance and improve the security</text:p>
      <text:p text:style-name="Text_20_body">TO LEARN<text:line-break/>network security group- <text:span text:style-name="T25">(nsg)</text:span> filter network traffic to and from Azure resources in an Azure virtual network. For each rule, you can specify source and destination, port, and protocol.</text:p>
      <text:p text:style-name="P31"><draw:frame draw:style-name="fr1" draw:name="Image7" text:anchor-type="char" svg:x="0.002in" svg:y="-0.0618in" svg:width="3.05in" svg:height="3.5252in" draw:z-index="6"><draw:image xlink:href="Pictures/100000000000016E000001A756449BC9.png" xlink:type="simple" xlink:show="embed" xlink:actuate="onLoad" draw:mime-type="image/png"/></draw:frame><text:span text:style-name="T26">Application security group</text:span>- configure network security as a natural extension of an application’s structure, allowing you to group virtual machines and define network security policies based on those groups</text:p>
      <text:p text:style-name="P31"/>
      <text:p text:style-name="P30"><text:span text:style-name="T27">subnet</text:span>- divide the vnet into smaller pieces, Vnet is the building while the subnet is the rooms</text:p>
      <text:p text:style-name="P30"/>
      <text:h text:style-name="Heading_20_2" text:outline-level="2">Azure service release stages</text:h>
      <text:list text:style-name="L11">
        <text:list-item>
          <text:p text:style-name="P53"><text:span text:style-name="Strong_20_Emphasis">Private Preview</text:span> → invitation-only </text:p>
        </text:list-item>
        <text:list-item>
          <text:p text:style-name="P53"><text:soft-page-break/><text:span text:style-name="Strong_20_Emphasis">Public Preview</text:span> → generally available to try, but still may have <text:span text:style-name="Strong_20_Emphasis">limitations</text:span> </text:p>
        </text:list-item>
        <text:list-item>
          <text:p text:style-name="P54"><text:span text:style-name="Strong_20_Emphasis">General Availability (GA)</text:span> → is officially released, stable, and fully supported for production workloads, backed by formal Service Level Agreements (SLAs).</text:p>
        </text:list-item>
      </text:list>
      <text:p text:style-name="P32"><text:span text:style-name="T3">Microsoft artifact</text:span>→ an Azure DevOps service used to create, host, and share package feeds (NuGet, npm, Maven, Python, Universal Packages) securely across teams and pipelines</text:p>
      <text:p text:style-name="P32"/>
      <text:p text:style-name="P32"><text:span text:style-name="T3">Azure Key</text:span> <text:span text:style-name="T3">Vault → </text:span><text:s/>is a cloud service for securely storing and accessing secrets, key,secret, certeficate metadata</text:p>
      <text:p text:style-name="P32"/>
      <text:p text:style-name="P32"/>
      <text:h text:style-name="Heading_20_1" text:outline-level="1">explaining words</text:h>
      <text:h text:style-name="P37" text:outline-level="4">Azure Service Health:</text:h>
      <text:p text:style-name="Text_20_body"><text:s/>Alerts on the health of Azure infrastructure</text:p>
      <text:h text:style-name="Heading_20_4" text:outline-level="4"><text:span text:style-name="T2">resiliency</text:span> </text:h>
      <text:p text:style-name="P16">is simply a system's ability to handle unexpected failures—like a server crashing, a datacenter losing power, or a sudden massive spike in traffic—and bounce back automatically without your users ever noticing</text:p>
      <text:h text:style-name="Heading_20_4" text:outline-level="4">azure policy</text:h>
      <text:p text:style-name="P27">used to dictate rules (e.g., "All servers must have port 22 closed" or "All databases must be encrypted") </text:p>
      <text:h text:style-name="Heading_20_4" text:outline-level="4">Elasticity </text:h>
      <text:p text:style-name="P28">in Azure is the ability of a cloud system to automatically and dynamically increase or decrease <text:s text:c="2"/>resources—such as CPU, RAM, or storage—in real-time based on fluctuating workload demands</text:p>
      <text:h text:style-name="Heading_20_3" text:outline-level="3">High Availability </text:h>
      <text:p text:style-name="P38">apps to be operation <text:s/>and accessible with minimal downtime reasons: hardware failures, software issues, or data center outages</text:p>
      <text:p text:style-name="P38"/>
      <text:h text:style-name="Heading_20_4" text:outline-level="4">Entra Id</text:h>
      <text:p text:style-name="Text_20_body">A cloud-based identity and access management service that your employees can use to access external resources</text:p>
      <text:h text:style-name="Heading_20_3" text:outline-level="3">Advisor</text:h>
      <text:p text:style-name="P55">A service that provides personalized best practices and recommendations to help optimize your Azure resources for cost, security, performance, and reliability.</text:p>
      <text:h text:style-name="Heading_20_3" text:outline-level="3">Microsoft Purview</text:h>
      <text:p text:style-name="Text_20_body">governs your <text:span text:style-name="T5">data</text:span></text:p>
      <text:p text:style-name="P55"><text:soft-page-break/><text:span text:style-name="T31">we</text:span>Microsoft Purview is a comprehensive, unified data governance, risk, and compliance platform designed to help organizations manage, protect, and govern their entire data estate</text:p>
      <text:h text:style-name="Heading_20_3" text:outline-level="3">Peering</text:h>
      <text:p text:style-name="P55">It is a feature that connects two VNets in Azure, allowing resources to communicate securely and with low latency.</text:p>
      <text:h text:style-name="Heading_20_3" text:outline-level="3">Azure Information Protection</text:h>
      <text:p text:style-name="Text_20_body">enables organizations to discover, classify, label, and protect sensitive documents and emails</text:p>
      <text:p text:style-name="Text_20_body"><text:span text:style-name="T29">It uses</text:span> uses Azure Rights Management (encryption service).</text:p>
      <text:p text:style-name="P55">So the chain is:</text:p>
      <text:p text:style-name="P55">Purview Information Protection → uses Azure Rights Management → provided by Azure Information Protection</text:p>
      <text:h text:style-name="Heading_20_3" text:outline-level="3">Recovery Services vault</text:h>
      <text:p text:style-name="Text_20_body">A service used to manage backup and disaster recovery operations in Azure. It stores recovery points and configurations for Azure-based backups and disaster recovery setups.</text:p>
      <text:list text:style-name="L14">
        <text:list-item>
          <text:p text:style-name="P58">“stores recovery points” </text:p>
        </text:list-item>
        <text:list-item>
          <text:p text:style-name="P57">“manages backup and disaster recovery” </text:p>
        </text:list-item>
      </text:list>
      <text:p text:style-name="Text_20_body">→ that is almost always <text:span text:style-name="Strong_20_Emphasis">Recovery Services vault</text:span> in Azure exam questions.</text:p>
      <text:p text:style-name="Text_20_body"/>
      <text:h text:style-name="Heading_20_3" text:outline-level="3">Application Insights</text:h>
      <text:p text:style-name="Text_20_body">An application performance management service that provides real-time monitoring and telemetry for applications.</text:p>
      <text:p text:style-name="Text_20_body"><text:span text:style-name="Strong_20_Emphasis">Telemetry</text:span> just means <text:span text:style-name="Strong_20_Emphasis">data collected automatically from a system while it’s running</text:span>.</text:p>
      <text:h text:style-name="Heading_20_3" text:outline-level="3">Azure Arc</text:h>
      <text:p text:style-name="P59">governs your <text:span text:style-name="T2">infrastructure</text:span></text:p>
      <text:list text:style-name="L15">
        <text:list-item>
          <text:p text:style-name="P61"><text:span text:style-name="Strong_20_Emphasis">Azure Arc</text:span> allows you to manage <text:span text:style-name="Strong_20_Emphasis">resources outside Azure</text:span>—like on-prem servers, other cloud VMs, Kubernetes clusters—from a <text:span text:style-name="Strong_20_Emphasis">single, unified platform</text:span>. </text:p>
        </text:list-item>
        <text:list-item>
          <text:p text:style-name="P60">It helps with <text:span text:style-name="Strong_20_Emphasis">governance, policy enforcement, and management</text:span> across hybrid and multicloud environments.</text:p>
        </text:list-item>
      </text:list>
      <text:p text:style-name="P59"/>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UI Text" svg:font-family="'SF UI Text', sans-serif"/>
    <style:font-face style:name="hurme no2-webfont" svg:font-family="'hurme no2-webfont', apple-system, BlinkMacSystemFont,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15:22:07.298406648</meta:creation-date>
    <dc:date>2026-03-29T19:48:44.372910246</dc:date>
    <meta:editing-duration>PT12H28M24S</meta:editing-duration>
    <meta:editing-cycles>11</meta:editing-cycles>
    <meta:generator>LibreOffice/24.2.7.2$Linux_X86_64 LibreOffice_project/420$Build-2</meta:generator>
    <meta:document-statistic meta:table-count="0" meta:image-count="7" meta:object-count="0" meta:page-count="10" meta:paragraph-count="206" meta:word-count="1844" meta:character-count="12118" meta:non-whitespace-character-count="10355"/>
  </office:meta>
</office:document-meta>
</file>